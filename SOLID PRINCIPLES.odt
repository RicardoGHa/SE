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5.3174in" table:align="left"/>
    </style:style>
    <style:style style:name="Table1.A" style:family="table-column">
      <style:table-column-properties style:column-width="0.5278in"/>
    </style:style>
    <style:style style:name="Table1.B" style:family="table-column">
      <style:table-column-properties style:column-width="1.5771in"/>
    </style:style>
    <style:style style:name="Table1.C" style:family="table-column">
      <style:table-column-properties style:column-width="3.2125in"/>
    </style:style>
    <style:style style:name="Table1.A1" style:family="table-cell">
      <style:table-cell-properties style:vertical-align="middle" fo:padding="0.0194in" fo:border="none"/>
    </style:style>
    <style:style style:name="P1" style:family="paragraph" style:parent-style-name="Text_20_body">
      <style:text-properties officeooo:rsid="0011701d"/>
    </style:style>
    <style:style style:name="P2" style:family="paragraph" style:parent-style-name="Heading_20_2">
      <style:text-properties officeooo:rsid="0011701d"/>
    </style:style>
    <style:style style:name="P3" style:family="paragraph" style:parent-style-name="Preformatted_20_Text">
      <style:paragraph-properties fo:margin-left="0in" fo:margin-right="0in" fo:margin-top="0in" fo:margin-bottom="0.0972in" style:contextual-spacing="false" fo:line-height="115%" fo:text-indent="0in" style:auto-text-indent="false"/>
      <style:text-properties officeooo:rsid="0011701d"/>
    </style:style>
    <style:style style:name="P4" style:family="paragraph" style:parent-style-name="Preformatted_20_Text">
      <style:paragraph-properties fo:margin-top="0in" fo:margin-bottom="0.0972in" style:contextual-spacing="false" fo:line-height="115%"/>
      <style:text-properties officeooo:rsid="0011701d"/>
    </style:style>
    <style:style style:name="P5" style:family="paragraph" style:parent-style-name="Heading_20_1">
      <style:text-properties officeooo:rsid="0011701d"/>
    </style:style>
    <style:style style:name="P6" style:family="paragraph" style:parent-style-name="Heading_20_1">
      <style:paragraph-properties fo:margin-top="0in" fo:margin-bottom="0.0972in" style:contextual-spacing="false" fo:line-height="115%"/>
      <style:text-properties officeooo:rsid="0011701d"/>
    </style:style>
    <style:style style:name="T1" style:family="text">
      <style:text-properties officeooo:rsid="0011701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lean code</text:h>
      <text:h text:style-name="Heading_20_2" text:outline-level="2">SOLID PRINCIPLES</text:h>
      <text:p text:style-name="Text_20_body">SOLID principles are <text:span text:style-name="Strong_20_Emphasis">5 rules/guidelines</text:span> that help you write cleaner code that is easier to change, test, and maintain. In your lesson, the “bad code” mixes validation, order handling, calculations, and searching all in one place, which creates tight coupling, low reusability, and poor testability. </text:p>
      <text:h text:style-name="Heading_20_3" text:outline-level="3">1. <text:span text:style-name="T1">S-</text:span>Single Responsibility Principle (SRP)</text:h>
      <text:p text:style-name="Text_20_body"><text:span text:style-name="Strong_20_Emphasis">Meaning:</text:span><text:line-break/>A class/function should have <text:span text:style-name="Strong_20_Emphasis">one main job</text:span>.</text:p>
      <text:p text:style-name="Text_20_body">Bad idea:</text:p>
      <text:p text:style-name="Text_20_body">class Order {</text:p>
      <text:p text:style-name="Text_20_body"><text:s text:c="2"/>addOrder() {}</text:p>
      <text:p text:style-name="Text_20_body"><text:s text:c="2"/>fetchOrder() {}</text:p>
      <text:p text:style-name="Text_20_body"><text:s text:c="2"/>calculateRevenue() {}</text:p>
      <text:p text:style-name="Text_20_body"><text:s text:c="2"/>validateOrder() {}</text:p>
      <text:p text:style-name="Text_20_body"><text:s text:c="2"/>saveToDatabase() {}</text:p>
      <text:p text:style-name="Text_20_body">}</text:p>
      <text:p text:style-name="P1">This class is doing too much.</text:p>
      <text:p text:style-name="P1">Better idea:</text:p>
      <text:p text:style-name="P1">class OrderService {</text:p>
      <text:p text:style-name="P1"><text:s text:c="2"/>// add and fetch orders</text:p>
      <text:p text:style-name="P1">}</text:p>
      <text:p text:style-name="P1"/>
      <text:p text:style-name="P1">class RevenueCalculator {</text:p>
      <text:p text:style-name="P1"><text:s text:c="2"/>// calculate revenue</text:p>
      <text:p text:style-name="P1">}</text:p>
      <text:p text:style-name="P1"/>
      <text:p text:style-name="P1">class OrderValidator {</text:p>
      <text:p text:style-name="P1"><text:s text:c="2"/>// validate orders</text:p>
      <text:p text:style-name="P1">}</text:p>
      <text:p text:style-name="P1"><text:soft-page-break/>Each class has one job.</text:p>
      <text:h text:style-name="Heading_20_3" text:outline-level="3">2. O — Open/Closed Principle</text:h>
      <text:p text:style-name="P1"><text:span text:style-name="Strong_20_Emphasis">Meaning:</text:span><text:line-break/>Your code should be <text:span text:style-name="Strong_20_Emphasis">open for extension</text:span>, but <text:span text:style-name="Strong_20_Emphasis">closed for modification</text:span>.</text:p>
      <text:p text:style-name="P1">That means:<text:line-break/>You should be able to add new behavior without breaking or editing old tested code too much.</text:p>
      <text:p text:style-name="P1">Bad idea:</text:p>
      <text:p text:style-name="P1">class Validator {</text:p>
      <text:p text:style-name="P1"><text:s text:c="2"/>validate(order) {</text:p>
      <text:p text:style-name="P1"><text:s text:c="4"/>if (order.price &lt;= 0) {</text:p>
      <text:p text:style-name="P1"><text:s text:c="6"/>throw new Error("Invalid price");</text:p>
      <text:p text:style-name="P1"><text:s text:c="4"/>}</text:p>
      <text:p text:style-name="P1"/>
      <text:p text:style-name="P1"><text:s text:c="4"/>if (order.item === "") {</text:p>
      <text:p text:style-name="P1"><text:s text:c="6"/>throw new Error("Invalid item");</text:p>
      <text:p text:style-name="P1"><text:s text:c="4"/>}</text:p>
      <text:p text:style-name="P1"/>
      <text:p text:style-name="P1"><text:s text:c="4"/>// Every new rule forces us to edit this class</text:p>
      <text:p text:style-name="P1"><text:s text:c="2"/>}</text:p>
      <text:p text:style-name="P1">}</text:p>
      <text:p text:style-name="P1">Better idea:</text:p>
      <text:p text:style-name="P1">interface ValidatorRule {</text:p>
      <text:p text:style-name="P1"><text:s text:c="2"/>validate(order: Order): void;</text:p>
      <text:p text:style-name="P1">}</text:p>
      <text:p text:style-name="P1"/>
      <text:p text:style-name="P1">class PriceValidator implements ValidatorRule {</text:p>
      <text:p text:style-name="P1"><text:s text:c="2"/>validate(order: Order): void {</text:p>
      <text:p text:style-name="P1"><text:s text:c="4"/>if (order.price &lt;= 0) {</text:p>
      <text:p text:style-name="P1"><text:s text:c="6"/>throw new Error("Price must be greater than zero");</text:p>
      <text:p text:style-name="P1"><text:s text:c="4"/>}</text:p>
      <text:p text:style-name="P1"><text:soft-page-break/><text:s text:c="2"/>}</text:p>
      <text:p text:style-name="P1">}</text:p>
      <text:p text:style-name="P1"/>
      <text:p text:style-name="P1">class ItemValidator implements ValidatorRule {</text:p>
      <text:p text:style-name="P1"><text:s text:c="2"/>validate(order: Order): void {</text:p>
      <text:p text:style-name="P1"><text:s text:c="4"/>if (!order.item) {</text:p>
      <text:p text:style-name="P1"><text:s text:c="6"/>throw new Error("Item is required");</text:p>
      <text:p text:style-name="P1"><text:s text:c="4"/>}</text:p>
      <text:p text:style-name="P1"><text:s text:c="2"/>}</text:p>
      <text:p text:style-name="P1">}</text:p>
      <text:p text:style-name="P1">Now you can add a new validator without rewriting the old ones.</text:p>
      <text:p text:style-name="P1"><text:span text:style-name="Strong_20_Emphasis">Simple example:</text:span><text:line-break/>Instead of rebuilding your whole car every time you want a new feature, you just add a new part.</text:p>
      <text:h text:style-name="P2" text:outline-level="2">3. L — Liskov Substitution Principle</text:h>
      <text:p text:style-name="P1"><text:span text:style-name="Strong_20_Emphasis">Meaning:</text:span><text:line-break/>A child class should be usable anywhere its parent class is expected, <text:span text:style-name="Strong_20_Emphasis">without breaking the program</text:span>.</text:p>
      <text:p text:style-name="P1">Bad idea:</text:p>
      <text:section text:style-name="Sect1" text:name="code-block-viewer">
        <text:p text:style-name="P3"><text:span text:style-name="Source_20_Text">class Bird {</text:span></text:p>
        <text:p text:style-name="P4"><text:span text:style-name="Source_20_Text"><text:s text:c="2"/>fly() {}</text:span></text:p>
        <text:p text:style-name="P4"><text:span text:style-name="Source_20_Text">}</text:span></text:p>
        <text:p text:style-name="P4"><text:span text:style-name="Source_20_Text">class Penguin extends Bird {</text:span></text:p>
        <text:p text:style-name="P4"><text:span text:style-name="Source_20_Text"><text:s text:c="2"/>fly() {</text:span></text:p>
        <text:p text:style-name="P4"><text:span text:style-name="Source_20_Text"><text:s text:c="4"/>throw new Error("Penguins cannot fly");</text:span></text:p>
        <text:p text:style-name="P4"><text:span text:style-name="Source_20_Text"><text:s text:c="2"/>}</text:span></text:p>
        <text:p text:style-name="P4"><text:span text:style-name="Source_20_Text">}</text:span></text:p>
      </text:section>
      <text:p text:style-name="P1">Problem:<text:line-break/>A penguin is a bird, but it cannot fly. So if the program expects every <text:span text:style-name="Source_20_Text">Bird</text:span> to fly, <text:span text:style-name="Source_20_Text">Penguin</text:span> breaks that rule.</text:p>
      <text:p text:style-name="P1">Better idea:</text:p>
      <text:section text:style-name="Sect1" text:name="Section1">
        <text:p text:style-name="P3"><text:bookmark text:name="code-block-viewer"/><text:span text:style-name="Source_20_Text">class Bird {}</text:span></text:p>
        <text:p text:style-name="P4"><text:span text:style-name="Source_20_Text">class FlyingBird extends Bird {</text:span></text:p>
        <text:p text:style-name="P4"><text:span text:style-name="Source_20_Text"><text:s text:c="2"/>fly() {}</text:span></text:p>
        <text:p text:style-name="P4"><text:soft-page-break/><text:span text:style-name="Source_20_Text">}</text:span></text:p>
        <text:p text:style-name="P4"><text:span text:style-name="Source_20_Text">class Eagle extends FlyingBird {}</text:span></text:p>
        <text:p text:style-name="P4"><text:span text:style-name="Source_20_Text">class Penguin extends Bird {</text:span></text:p>
        <text:p text:style-name="P4"><text:span text:style-name="Source_20_Text"><text:s text:c="2"/>swim() {}</text:span></text:p>
        <text:p text:style-name="P4"><text:span text:style-name="Source_20_Text">}</text:span></text:p>
      </text:section>
      <text:p text:style-name="P1">Now only flying birds have <text:span text:style-name="Source_20_Text">fly()</text:span>.</text:p>
      <text:p text:style-name="P1"><text:span text:style-name="Strong_20_Emphasis">Simple example:</text:span><text:line-break/>If I tell you “give me any vehicle that can drive,” and you give me a boat, the system breaks. A child type must actually support what the parent promises.</text:p>
      <text:h text:style-name="P2" text:outline-level="2">4. I — Interface Segregation Principle</text:h>
      <text:p text:style-name="P1"><text:span text:style-name="Strong_20_Emphasis">Meaning:</text:span><text:line-break/>Do not force a class to implement things it does not need.</text:p>
      <text:p text:style-name="P1">Bad idea:</text:p>
      <text:section text:style-name="Sect1" text:name="Section2">
        <text:p text:style-name="P3"><text:bookmark text:name="code-block-viewer Copy 1"/><text:span text:style-name="Source_20_Text">interface Worker {</text:span></text:p>
        <text:p text:style-name="P4"><text:span text:style-name="Source_20_Text"><text:s text:c="2"/>code(): void;</text:span></text:p>
        <text:p text:style-name="P4"><text:span text:style-name="Source_20_Text"><text:s text:c="2"/>design(): void;</text:span></text:p>
        <text:p text:style-name="P4"><text:span text:style-name="Source_20_Text"><text:s text:c="2"/>cook(): void;</text:span></text:p>
        <text:p text:style-name="P4"><text:span text:style-name="Source_20_Text">}</text:span></text:p>
      </text:section>
      <text:p text:style-name="P1">Now every worker must code, design, and cook, even if they only code.</text:p>
      <text:p text:style-name="P1">Better idea:</text:p>
      <text:section text:style-name="Sect1" text:name="Section3">
        <text:p text:style-name="P3"><text:bookmark text:name="code-block-viewer Copy 2"/><text:span text:style-name="Source_20_Text">interface Developer {</text:span></text:p>
        <text:p text:style-name="P4"><text:span text:style-name="Source_20_Text"><text:s text:c="2"/>code(): void;</text:span></text:p>
        <text:p text:style-name="P4"><text:span text:style-name="Source_20_Text">}</text:span></text:p>
        <text:p text:style-name="P4"><text:span text:style-name="Source_20_Text">interface Designer {</text:span></text:p>
        <text:p text:style-name="P4"><text:span text:style-name="Source_20_Text"><text:s text:c="2"/>design(): void;</text:span></text:p>
        <text:p text:style-name="P4"><text:span text:style-name="Source_20_Text">}</text:span></text:p>
        <text:p text:style-name="P4"><text:span text:style-name="Source_20_Text">interface Chef {</text:span></text:p>
        <text:p text:style-name="P4"><text:span text:style-name="Source_20_Text"><text:s text:c="2"/>cook(): void;</text:span></text:p>
        <text:p text:style-name="P4"><text:span text:style-name="Source_20_Text">}</text:span></text:p>
      </text:section>
      <text:p text:style-name="P1">Now each class only uses what it needs.</text:p>
      <text:p text:style-name="P1"><text:span text:style-name="Strong_20_Emphasis">Simple example:</text:span><text:line-break/>Do not give every employee the same huge contract of responsibilities. Give each person only the tasks related to their role.</text:p>
      <text:h text:style-name="P2" text:outline-level="2"><text:soft-page-break/>5. D — Dependency Inversion Principle</text:h>
      <text:p text:style-name="P1"><text:span text:style-name="Strong_20_Emphasis">Meaning:</text:span><text:line-break/>High-level code should not depend directly on low-level details.<text:line-break/>Both should depend on abstractions, like interfaces.</text:p>
      <text:p text:style-name="P1">Bad idea:</text:p>
      <text:section text:style-name="Sect1" text:name="Section4">
        <text:p text:style-name="P3"><text:bookmark text:name="code-block-viewer Copy 3"/><text:span text:style-name="Source_20_Text">class OrderService {</text:span></text:p>
        <text:p text:style-name="P4"><text:span text:style-name="Source_20_Text"><text:s text:c="2"/>private database = new MySQLDatabase();</text:span></text:p>
        <text:p text:style-name="P4"><text:span text:style-name="Source_20_Text"><text:s text:c="2"/>save(order: Order) {</text:span></text:p>
        <text:p text:style-name="P4"><text:span text:style-name="Source_20_Text"><text:s text:c="4"/>this.database.save(order);</text:span></text:p>
        <text:p text:style-name="P4"><text:span text:style-name="Source_20_Text"><text:s text:c="2"/>}</text:span></text:p>
        <text:p text:style-name="P4"><text:span text:style-name="Source_20_Text">}</text:span></text:p>
      </text:section>
      <text:p text:style-name="P1">Problem:<text:line-break/><text:span text:style-name="Source_20_Text">OrderService</text:span> is stuck with <text:span text:style-name="Source_20_Text">MySQLDatabase</text:span>. If you change to MongoDB, Firebase, or an API, you must edit <text:span text:style-name="Source_20_Text">OrderService</text:span>.</text:p>
      <text:p text:style-name="P1">Better idea:</text:p>
      <text:section text:style-name="Sect1" text:name="Section5">
        <text:p text:style-name="P3"><text:bookmark text:name="code-block-viewer Copy 4"/><text:span text:style-name="Source_20_Text">interface OrderRepository {</text:span></text:p>
        <text:p text:style-name="P4"><text:span text:style-name="Source_20_Text"><text:s text:c="2"/>save(order: Order): void;</text:span></text:p>
        <text:p text:style-name="P4"><text:span text:style-name="Source_20_Text">}</text:span></text:p>
        <text:p text:style-name="P4"><text:span text:style-name="Source_20_Text">class MySQLOrderRepository implements OrderRepository {</text:span></text:p>
        <text:p text:style-name="P4"><text:span text:style-name="Source_20_Text"><text:s text:c="2"/>save(order: Order): void {</text:span></text:p>
        <text:p text:style-name="P4"><text:span text:style-name="Source_20_Text"><text:s text:c="4"/>// save to MySQL</text:span></text:p>
        <text:p text:style-name="P4"><text:span text:style-name="Source_20_Text"><text:s text:c="2"/>}</text:span></text:p>
        <text:p text:style-name="P4"><text:span text:style-name="Source_20_Text">}</text:span></text:p>
        <text:p text:style-name="P4"><text:span text:style-name="Source_20_Text">class OrderService {</text:span></text:p>
        <text:p text:style-name="P4"><text:span text:style-name="Source_20_Text"><text:s text:c="2"/>constructor(private repository: OrderRepository) {}</text:span></text:p>
        <text:p text:style-name="P4"><text:span text:style-name="Source_20_Text"><text:s text:c="2"/>save(order: Order): void {</text:span></text:p>
        <text:p text:style-name="P4"><text:span text:style-name="Source_20_Text"><text:s text:c="4"/>this.repository.save(order);</text:span></text:p>
        <text:p text:style-name="P4"><text:span text:style-name="Source_20_Text"><text:s text:c="2"/>}</text:span></text:p>
        <text:p text:style-name="P4"><text:span text:style-name="Source_20_Text">}</text:span></text:p>
      </text:section>
      <text:p text:style-name="P1">Now <text:span text:style-name="Source_20_Text">OrderService</text:span> does not care where the data is saved.</text:p>
      <text:p text:style-name="P1"><text:span text:style-name="Strong_20_Emphasis">Simple example:</text:span><text:line-break/>Your phone charger works because it depends on a standard charging port. It does not need to know the full electrical system behind the wall.</text:p>
      <text:p text:style-name="P1"/>
      <text:h text:style-name="P5" text:outline-level="1"><text:soft-page-break/>Easy way to rememb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Letter</text:p>
            </table:table-cell>
            <table:table-cell table:style-name="Table1.A1" office:value-type="string">
              <text:p text:style-name="Table_20_Heading">Principle</text:p>
            </table:table-cell>
            <table:table-cell table:style-name="Table1.A1" office:value-type="string">
              <text:p text:style-name="Table_20_Heading">Simple meaning</text:p>
            </table:table-cell>
          </table:table-row>
        </table:table-header-rows>
        <table:table-row>
          <table:table-cell table:style-name="Table1.A1" office:value-type="string">
            <text:p text:style-name="Table_20_Contents">S</text:p>
          </table:table-cell>
          <table:table-cell table:style-name="Table1.A1" office:value-type="string">
            <text:p text:style-name="Table_20_Contents">Single Responsibility</text:p>
          </table:table-cell>
          <table:table-cell table:style-name="Table1.A1" office:value-type="string">
            <text:p text:style-name="Table_20_Contents">One class = one job</text:p>
          </table:table-cell>
        </table:table-row>
        <table:table-row>
          <table:table-cell table:style-name="Table1.A1" office:value-type="string">
            <text:p text:style-name="Table_20_Contents">O</text:p>
          </table:table-cell>
          <table:table-cell table:style-name="Table1.A1" office:value-type="string">
            <text:p text:style-name="Table_20_Contents">Open/Closed</text:p>
          </table:table-cell>
          <table:table-cell table:style-name="Table1.A1" office:value-type="string">
            <text:p text:style-name="Table_20_Contents">Add new features without breaking old code</text:p>
          </table:table-cell>
        </table:table-row>
        <table:table-row>
          <table:table-cell table:style-name="Table1.A1" office:value-type="string">
            <text:p text:style-name="Table_20_Contents">L</text:p>
          </table:table-cell>
          <table:table-cell table:style-name="Table1.A1" office:value-type="string">
            <text:p text:style-name="Table_20_Contents">Liskov Substitution</text:p>
          </table:table-cell>
          <table:table-cell table:style-name="Table1.A1" office:value-type="string">
            <text:p text:style-name="Table_20_Contents">Child classes should not break parent behavior</text:p>
          </table:table-cell>
        </table:table-row>
        <table:table-row>
          <table:table-cell table:style-name="Table1.A1" office:value-type="string">
            <text:p text:style-name="Table_20_Contents">I</text:p>
          </table:table-cell>
          <table:table-cell table:style-name="Table1.A1" office:value-type="string">
            <text:p text:style-name="Table_20_Contents">Interface Segregation</text:p>
          </table:table-cell>
          <table:table-cell table:style-name="Table1.A1" office:value-type="string">
            <text:p text:style-name="Table_20_Contents">Do not force unused methods</text:p>
          </table:table-cell>
        </table:table-row>
        <table:table-row>
          <table:table-cell table:style-name="Table1.A1" office:value-type="string">
            <text:p text:style-name="Table_20_Contents">D</text:p>
          </table:table-cell>
          <table:table-cell table:style-name="Table1.A1" office:value-type="string">
            <text:p text:style-name="Table_20_Contents">Dependency Inversion</text:p>
          </table:table-cell>
          <table:table-cell table:style-name="Table1.A1" office:value-type="string">
            <text:p text:style-name="Table_20_Contents">Depend on interfaces, not concrete classes</text:p>
          </table:table-cell>
        </table:table-row>
      </table:table>
      <text:h text:style-name="P6" text:outline-level="1">In your order example</text:h>
      <text:p text:style-name="P1">The bad code has everything mixed together:</text:p>
      <text:section text:style-name="Sect1" text:name="Section6">
        <text:p text:style-name="P3"><text:bookmark text:name="code-block-viewer Copy 5"/><text:span text:style-name="Source_20_Text">// validation</text:span></text:p>
        <text:p text:style-name="P4"><text:span text:style-name="Source_20_Text">// adding order</text:span></text:p>
        <text:p text:style-name="P4"><text:span text:style-name="Source_20_Text">// calculating revenue</text:span></text:p>
        <text:p text:style-name="P4"><text:span text:style-name="Source_20_Text">// calculating average</text:span></text:p>
        <text:p text:style-name="P4"><text:span text:style-name="Source_20_Text">// fetching order</text:span></text:p>
      </text:section>
      <text:p text:style-name="P1">SOLID says split it like this:</text:p>
      <text:section text:style-name="Sect1" text:name="Section7">
        <text:p text:style-name="P3"><text:bookmark text:name="code-block-viewer Copy 6"/><text:span text:style-name="Source_20_Text">OrderService <text:s text:c="7"/>// add, fetch, store orders</text:span></text:p>
        <text:p text:style-name="P4"><text:span text:style-name="Source_20_Text">OrderValidator <text:s text:c="5"/>// validate item and price</text:span></text:p>
        <text:p text:style-name="P4"><text:span text:style-name="Source_20_Text">RevenueCalculator <text:s text:c="2"/>// calculate total and average</text:span></text:p>
        <text:p text:style-name="P4"><text:span text:style-name="Source_20_Text">OrderRepository <text:s text:c="4"/>// save/fetch data</text:span></text:p>
      </text:section>
      <text:p text:style-name="P1">So instead of one big messy file, you get small pieces that are easier to understand and change.</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7T19:07:24.556633987</meta:creation-date>
    <dc:date>2026-06-07T19:15:23.447204444</dc:date>
    <meta:editing-duration>PT8M</meta:editing-duration>
    <meta:editing-cycles>1</meta:editing-cycles>
    <meta:document-statistic meta:table-count="1" meta:image-count="0" meta:object-count="0" meta:page-count="6" meta:paragraph-count="163" meta:word-count="755" meta:character-count="4745" meta:non-whitespace-character-count="3984"/>
    <meta:generator>LibreOffice/26.2.3.2$Linux_X86_64 LibreOffice_project/620$Build-2</meta:generator>
  </office:meta>
</office:document-meta>
</file>